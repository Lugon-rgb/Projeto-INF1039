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09a9d2" officeooo:paragraph-rsid="0009a9d2"/>
    </style:style>
    <style:style style:name="P2" style:family="paragraph" style:parent-style-name="Standard">
      <style:text-properties style:font-name="Calibri" fo:font-size="12pt" officeooo:paragraph-rsid="00087377" style:font-name-asian="Calibri1" style:font-size-asian="12pt" style:font-name-complex="Calibri1" style:font-size-complex="12pt"/>
    </style:style>
    <style:style style:name="P3" style:family="paragraph" style:parent-style-name="Standard">
      <style:text-properties officeooo:paragraph-rsid="00087377"/>
    </style:style>
    <style:style style:name="P4" style:family="paragraph" style:parent-style-name="Standard">
      <style:text-properties style:font-name="Calibri" fo:font-size="12pt" officeooo:paragraph-rsid="000986f4" style:font-name-asian="Calibri1" style:font-size-asian="12pt" style:font-name-complex="Calibri1" style:font-size-complex="12pt"/>
    </style:style>
    <style:style style:name="T1" style:family="text">
      <style:text-properties style:font-name="Calibri" fo:font-size="21pt" fo:font-weight="bold" style:font-name-asian="Calibri1" style:font-size-asian="21pt" style:font-weight-asian="bold" style:font-name-complex="Calibri1" style:font-size-complex="21pt" style:font-weight-complex="bold"/>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officeooo:rsid="00087377"/>
    </style:style>
    <style:style style:name="T4" style:family="text">
      <style:text-properties style:font-name="Calibri" fo:font-size="12pt" officeooo:rsid="00087377" style:font-name-asian="Calibri1" style:font-size-asian="12pt" style:font-name-complex="Calibri1" style:font-size-complex="12pt"/>
    </style:style>
    <style:style style:name="T5" style:family="text">
      <style:text-properties style:font-name="Calibri" fo:font-size="12pt" officeooo:rsid="000986f4" style:font-name-asian="Calibri1" style:font-size-asian="12pt" style:font-name-complex="Calibri1" style:font-size-complex="12pt"/>
    </style:style>
    <style:style style:name="T6" style:family="text">
      <style:text-properties style:font-name="Calibri" fo:font-size="12pt" fo:font-weight="bold" style:font-name-asian="Calibri1" style:font-size-asian="12pt" style:font-weight-asian="bold" style:font-name-complex="Calibri1" style:font-size-complex="12pt" style:font-weight-complex="bold"/>
    </style:style>
    <style:style style:name="T7" style:family="text">
      <style:text-properties style:font-name="Calibri" fo:font-size="12pt" fo:font-weight="bold" officeooo:rsid="000986f4" style:font-name-asian="Calibri1" style:font-size-asian="12pt" style:font-weight-asian="bold" style:font-name-complex="Calibri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ntrevista Ernesto - 24/03/26</text:span></text:p>
      <text:p text:style-name="Standard"><text:span text:style-name="T2">(0:00 - 0:23)</text:span></text:p>
      <text:p text:style-name="P2">- Bom dia, meu nome é Gabriel e eu vou estar entrevistando…</text:p>
      <text:p text:style-name="P2">- O objetivo dessa entrevista é entender um pouco das experiências que jovens, adultos e universitários têm com a gestão de tempo e dinheiro no dia-a-dia. A ideia é utilizar as informações adquiridas para desenvolver um aplicativo que ajude nessa área.</text:p>
      <text:p text:style-name="P2">- A entrevista terá duração aproximada de oito minutos e será gravada.</text:p>
      <text:p text:style-name="Standard"/>
      <text:p text:style-name="Standard"><text:span text:style-name="T2">(0:25 - 0:34)</text:span></text:p>
      <text:p text:style-name="P2">- A entrevista pode ser interrompida a qualquer momento. Caso isso aconteça, os dados coletados não serão utilizados.</text:p>
      <text:p text:style-name="P2">- Bom, eu gostaria de perguntar qual é o seu nome.</text:p>
      <text:p text:style-name="Standard"/>
      <text:p text:style-name="Standard"><text:span text:style-name="T2">(0:36 - 0:42)</text:span></text:p>
      <text:p text:style-name="P2">- Completo?</text:p>
      <text:p text:style-name="P2">- Sim.</text:p>
      <text:p text:style-name="P2">- Ernesto Tornelis Ituaçu.</text:p>
      <text:p text:style-name="P2">- Pode me dizer a sua idade?</text:p>
      <text:p text:style-name="P2">- 23 anos.</text:p>
      <text:p text:style-name="Standard"/>
      <text:p text:style-name="Standard"><text:span text:style-name="T2">(0:43 - 0:57)</text:span></text:p>
      <text:p text:style-name="P2">- E o nível de escolaridade, por favor?</text:p>
      <text:p text:style-name="P2">- Eu estou em curs<text:span text:style-name="T3">and</text:span>o do ensino superior e eu acho que é isso o formal.</text:p>
      <text:p text:style-name="P2">- Me fale um pouco de qual é a sua rotina em um dia típico de semana.</text:p>
      <text:p text:style-name="Standard"/>
      <text:p text:style-name="Standard"><text:span text:style-name="T2">(0:58 - 1:14)</text:span></text:p>
      <text:p text:style-name="P2">- O que você faz além de estudar?</text:p>
      <text:p text:style-name="P2">- Cara, atualmente eu acordo, né? Aí eu vou estudar. Aí eu tenho... Eu estudo mais ou menos até uma, ou as três, depende do dia. E aí depois o resto do meu dia é questão de estágio.</text:p>
      <text:p text:style-name="Standard"/>
      <text:p text:style-name="Standard"><text:span text:style-name="T2">(1:14 - 1:25)</text:span></text:p>
      <text:p text:style-name="Standard"><text:span text:style-name="T2">- E aí depois, mais à noite, quando acaba o estágio eu d</text:span><text:span text:style-name="T4">ou uma</text:span><text:span text:style-name="T2"> estuda</text:span><text:span text:style-name="T4">da</text:span><text:span text:style-name="T2"> de novo e volto pra casa. É basicamente estudo, estágio, estudo. E aí, às vezes, ocasionalmente eu tenho um tempinho pra alguma outra coisa, jogar alguma parada.</text:span></text:p>
      <text:p text:style-name="Standard"/>
      <text:p text:style-name="Standard"><text:span text:style-name="T2">(1:26 - 1:54)</text:span></text:p>
      <text:p text:style-name="P2">- Mas é apertado.</text:p>
      <text:p text:style-name="P2">- Como você faz pra organizar suas tarefas e compromissos?</text:p>
      <text:p text:style-name="P2">- Então, eu tenho problemas que eu não consigo muito, né? Mas eu tenho o Google, tipo, eu tenho a Google Agenda de coisas, tipo, ah, tá bom, eu sei que minhas aulas começam nesse horário, aí eu deveria fazer certas coisas em certos horários, esse tipo de coisa. Mas é muito complicado, porque às vezes aparece alguém falando, ah, vamos fazer alguma coisa.</text:p>
      <text:p text:style-name="Standard"/>
      <text:p text:style-name="Standard"><text:span text:style-name="T2">(1:54 - 2:09)</text:span></text:p>
      <text:p text:style-name="Standard"><text:span text:style-name="T2">- Isso não tá na minha rotina, mas eu não quero dizer não, porque eu quero fazer alguma coisa também, né? E aí dá certos problemas. Mas, em geral, o que eu uso pra me organizar </text:span><text:soft-page-break/><text:span text:style-name="T2">é meio, tipo, a minha própria cabeça, a minha própria disciplina e uns aplicativoszinho de agenda. Mais pra eu saber certinho os horários.</text:span></text:p>
      <text:p text:style-name="Standard"/>
      <text:p text:style-name="Standard"><text:span text:style-name="T2">(2:10 - 2:39)</text:span></text:p>
      <text:p text:style-name="P2">- Você já sentiu que estava com pouco tempo pra completar suas obrigações? Como você lidou com isso?</text:p>
      <text:p text:style-name="P2">- Completamente. Constantemente eu tenho pouco tempo pra fazer as coisas que eu quero. E o jeito que eu ando lidando com isso é, tipo, é porque os meus compromissos são relativamente maleáveis, então dá pra ser conversado com certas coisas, assim, tipo, ah, a gente não pode fazer isso em vez de fazer sexta, fazer quinta, ou fazer um pouco mais tarde na sexta, ou alguma coisa assim.</text:p>
      <text:p text:style-name="Standard"/>
      <text:p text:style-name="Standard"><text:span text:style-name="T2">(2:39 - 2:49)</text:span></text:p>
      <text:p text:style-name="Standard"><text:span text:style-name="T2"><text:s/>- Então eu vou tentando adaptar. Muito na base da conversa, mas também não tem muito garantia de que vai dar certo. Então, às vezes, eu acabo também só não conseguindo ir na coisa que eu quero ir por causa dos meus compromissos.</text:span></text:p>
      <text:p text:style-name="Standard"/>
      <text:p text:style-name="Standard"><text:span text:style-name="T2">(2:49 - 3:07)</text:span></text:p>
      <text:p text:style-name="P2">- Ou eu acabo tendo que faltar um compromisso porque eu quero ir pra uma coisa que eu quero ir. Não é muito legal, mas é o que temos pra hoje.</text:p>
      <text:p text:style-name="P2">- E durante a semana, como você faz pra organizar? Você usa algum tipo de método específico, uma estratégia?</text:p>
      <text:p text:style-name="P2">- É um pouco do aplicativo e bater papo, principalmente.</text:p>
      <text:p text:style-name="Standard"/>
      <text:p text:style-name="Standard"><text:span text:style-name="T2">(3:07 - 3:35)</text:span></text:p>
      <text:p text:style-name="P2">- Eu não acho que tem muito mais do que eu já falei. Acabei entrando um pouco mais nessa pergunta e nas outras também.</text:p>
      <text:p text:style-name="P2">- Com relação à gestão de dinheiro, como você obtém a sua renda?</text:p>
      <text:p text:style-name="P3"><text:span text:style-name="T2">- Estágio. </text:span><text:span text:style-name="T2">Estágio e </text:span><text:span text:style-name="T4">m</text:span><text:span text:style-name="T2">esada, né? Porque ninguém é de ferro. A gente tá na </text:span><text:span text:style-name="T4">PUC</text:span><text:span text:style-name="T2"> aqui e a gente tem essa possibilidade, felizmente.</text:span></text:p>
      <text:p text:style-name="P2">- Como você julga se algo vale a pena comprar?</text:p>
      <text:p text:style-name="P2">- Cara, eu sinto que eu tenho uma noção de, tipo, dinheiro.</text:p>
      <text:p text:style-name="Standard"/>
      <text:p text:style-name="Standard"><text:span text:style-name="T2">(3:35 - 3:52)</text:span></text:p>
      <text:p text:style-name="Standard"><text:span text:style-name="T2">- De quanto vale o tempo, de quanto vale o dinheiro que eu tenho. É uma junção do quanto dinheiro eu tenho pra esse mês, de quanto vale, tipo, quanto normalmente eu trabalho, quanto que vale a minha hora de trabalho, no estágio principalmente. E aí isso já me dá um pouco de valor de dinheiro.</text:span></text:p>
      <text:p text:style-name="Standard"/>
      <text:p text:style-name="Standard"><text:span text:style-name="T2">(3:52 - 4:20)</text:span></text:p>
      <text:p text:style-name="P2">- Tipo, se eu sei que eu precisaria trabalhar por, sei lá, uma hora pra conseguir esse dinheiro, você acha que vale a pena eu, sei lá, ir jantar com um amigo e aí eu vou ficar duas horas jantando e aí seria o quê? Três horas de trabalho? Será que vale a pena essa troca? Uma troca de tempo, eu diria, principalmente.</text:p>
      <text:p text:style-name="P2">- E como foram os seus gastos no último mês?</text:p>
      <text:p text:style-name="P2">- Foram moderados, eu diria. Não gastei demais, com absolutamente nada.</text:p>
      <text:p text:style-name="Standard"/>
      <text:p text:style-name="Standard"><text:span text:style-name="T2">(4:20 - 4:35)</text:span></text:p>
      <text:p text:style-name="P4"><text:soft-page-break/>- Eu gastei muito com saída, mas também não acho que nada muito fora do padrão, assim. Não acho que tá muito descontrolado.</text:p>
      <text:p text:style-name="P4">- Em quais momentos você sentiu que estava apertado financeiramente?</text:p>
      <text:p text:style-name="P4">- Final do mês, que tá acabando, né? Final do mês.</text:p>
      <text:p text:style-name="Standard"/>
      <text:p text:style-name="Standard"><text:span text:style-name="T2">(4:35 - 5:00)</text:span></text:p>
      <text:p text:style-name="P4">- Mas normalmente costuma sobrar um pouco, assim, pra eu botar uma caixinha de investimentos, esse tipo de coisa. Não costumo ficar tão apertado, assim, a ponto de precisar de mais dinheiro.</text:p>
      <text:p text:style-name="P4">- Além de como você julga se algo vale a pena, como você planeja os seus gastos?</text:p>
      <text:p text:style-name="P4">- Eu vejo quando falta pra acabar o mês.</text:p>
      <text:p text:style-name="Standard"/>
      <text:p text:style-name="Standard"><text:span text:style-name="T2">(5:01 - 5:09)</text:span></text:p>
      <text:p text:style-name="Standard"><text:span text:style-name="T2">E aí eu consigo dinheiro. Se tá acabando o mês e eu tô com bastante dinheiro, sei que eu posso brincar um pouco mais. Se tá acabando o mês e eu tô com pouco dinheiro, sei que eu posso brincar um pouco menos.</text:span></text:p>
      <text:p text:style-name="Standard"/>
      <text:p text:style-name="Standard"><text:span text:style-name="T2">(5:09 - 5:28)</text:span></text:p>
      <text:p text:style-name="P4">- E aí é uma questão de tempo também. Quanto tempo falta pra eu receber a próxima leva. - Você utiliza algum tipo de aplicativo, uma ferramenta pra te auxiliar a gerenciar seus gastos, seu mês financeiro ou algo do tipo?</text:p>
      <text:p text:style-name="P4">- Aplicativo do banco serve.</text:p>
      <text:p text:style-name="Standard"/>
      <text:p text:style-name="Standard"><text:span text:style-name="T2">(5:28 - 5:40)</text:span></text:p>
      <text:p text:style-name="Standard"><text:span text:style-name="T2">-</text:span><text:span text:style-name="T5"> </text:span><text:span text:style-name="T2">Tipo, </text:span><text:span text:style-name="T5">e</text:span><text:span text:style-name="T2">u poderia usar um Excel ou coisa desse tipo, mas eu não tenho tantos gastos mensais e recorrentes, nem parcela, nem nada assim. Então, por enquanto, aplicativo do banco resolve. Mas, eventualmente, eu vou precisar de alguma coisa um pouco mais poderosa do que isso.</text:span></text:p>
      <text:p text:style-name="Standard"/>
      <text:p text:style-name="Standard"><text:span text:style-name="T2">(5:42 - 6:11)</text:span></text:p>
      <text:p text:style-name="P4">- Agora, relacionando tempo e dinheiro.</text:p>
      <text:p text:style-name="P4">- Você já teve alguma despesa que acontece justamente porque você não se organizou direito? Como você teve que comprar um ancho porque você saiu de casa atrasado, ou não deu tempo de fazer pra levar, ou teve que pegar um Uber porque você se atrasou pro ônibus?</text:p>
      <text:p text:style-name="P4">- Eu já tive alguma dessas, mas eu não considero isso como uma despesa por falta de tempo. Acho que é uma questão mais de escolhas, assim.</text:p>
      <text:p text:style-name="Standard"/>
      <text:p text:style-name="Standard"><text:span text:style-name="T2">(6:11 - 6:28)</text:span></text:p>
      <text:p text:style-name="Standard"><text:span text:style-name="T2">- Pelo menos na minha realidade, é uma questão meio de escolha. Que eu posso sair um pouco mais tarde de casa e aí eu sei que eu vou ter que ir de Uber, mas aí eu posso tomar café da manhã em casa. Ou eu posso sair mais cedo de casa, pegar um ônibus e aí eu vou ter que comprar um café da manhã na PUC, por exemplo.</text:span></text:p>
      <text:p text:style-name="Standard"/>
      <text:p text:style-name="Standard"><text:span text:style-name="T2">(6:28 - 6:50)</text:span></text:p>
      <text:p text:style-name="P4">- Aí é uma questão de, tipo, tá bom, o que eu prefiro? Eu prefiro o café da manhã em casa ou eu prefiro pegar o ônibus e comprar o café da manhã na PUC? Acho que é uma questão mais, tipo, de escolhas, assim. Não é muito um problema pra mim.</text:p>
      <text:p text:style-name="P4"><text:soft-page-break/>- Você acha que se você tivesse mais controle do seu tempo, você gastaria menos dinheiro? - Possivelmente, possivelmente.</text:p>
      <text:p text:style-name="Standard"/>
      <text:p text:style-name="Standard"><text:span text:style-name="T2">(6:50 - 7:13)</text:span></text:p>
      <text:p text:style-name="Standard"><text:span text:style-name="T2">- Não consigo afirmar isso com completa certeza, mas eu acho que sim. Porque, né, é um pouco, tipo, se eu tiver total controle do meu tempo, assumindo que eu consiga, tipo, controlar imprevistos, esse tipo de coisa, eu consigo me organizar melhor e aí eu posso fazer escolhas mais custo-efetivas, digamos assim. Tipo, eu não vou perder uma passagem ou, tipo, esse tipo de coisa.</text:span></text:p>
      <text:p text:style-name="Standard"/>
      <text:p text:style-name="Standard"><text:span text:style-name="T2">(7:14 - 7:19)</text:span></text:p>
      <text:p text:style-name="Standard"><text:span text:style-name="T2">- Bom, essas eram as perguntas. Obrigado por participar e tenha um bom dia. Tchau.</text:span></text:p>
      <text:p text:style-name="Standard"><text:s/><text:span text:style-name="T6">Transcrito por </text:span><text:span text:style-name="T7">TurboScribe, revisado por Gabriel Lug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pt" fo:country="BR" style:letter-kerning="false" style:font-name-asian="Noto Serif CJK SC" style:font-size-asian="10pt" style:language-asian="zh" style:country-asian="CN" style:font-name-complex="Noto Sans Devanagari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Times New Roman" fo:font-size="10pt" fo:language="pt" fo:country="BR" style:letter-kerning="false" style:font-name-asian="Noto Serif CJK SC" style:font-size-asian="10pt" style:language-asian="zh" style:country-asian="CN" style:font-name-complex="Noto Sans Devanagari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WhatsApp Audio 2026-03-24 at 15.36.54</dc:title>
    <meta:initial-creator>TurboScribe</meta:initial-creator>
    <meta:editing-cycles>3</meta:editing-cycles>
    <meta:creation-date>2026-03-25T16:27:14.587000000</meta:creation-date>
    <dc:date>2026-03-25T13:55:01.335394274</dc:date>
    <meta:editing-duration>PT14M50S</meta:editing-duration>
    <meta:generator>LibreOffice/25.8.5.2$Linux_X86_64 LibreOffice_project/580$Build-2</meta:generator>
    <meta:document-statistic meta:table-count="0" meta:image-count="0" meta:object-count="0" meta:page-count="4" meta:paragraph-count="79" meta:word-count="1415" meta:character-count="7408" meta:non-whitespace-character-count="6070"/>
  </office:meta>
</office:document-meta>
</file>